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2in"/>
    </style:style>
    <style:style style:name="co2" style:family="table-column">
      <style:table-column-properties fo:break-before="auto" style:column-width="0.9693in"/>
    </style:style>
    <style:style style:name="co3" style:family="table-column">
      <style:table-column-properties fo:break-before="auto" style:column-width="0.3307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2.4772in"/>
    </style:style>
    <style:style style:name="co6" style:family="table-column">
      <style:table-column-properties fo:break-before="auto" style:column-width="2.0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98in" fo:break-before="auto" style:use-optimal-row-height="true"/>
    </style:style>
    <style:style style:name="ro3" style:family="table-row">
      <style:table-row-properties style:row-height="0.3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ESPDriv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apacitor SMD:C 0805 2012Metric Pad1.18x1.45mm HandSolde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5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ackage TO SOT SMD:SOT-23</text:p>
          </table:table-cell>
          <table:table-cell office:value-type="string" calcext:value-type="string">
            <text:p>https://www.diodes.com/assets/Datasheets/ds11005.pdf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onnector PinHeader 2.54mm:PinHeader 1x04 P2.54mm Vertica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32-DEVKIT-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1</text:p>
          </table:table-cell>
          <table:table-cell office:value-type="string" calcext:value-type="string">
            <text:p>Ehryk:ESP32 DEVKIT V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O34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ackage TO SOT SMD:SOT-23</text:p>
          </table:table-cell>
          <table:table-cell office:value-type="string" calcext:value-type="string">
            <text:p>http://www.aosmd.com/pdfs/datasheet/AO3401A.pdf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O340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ackage TO SOT SMD:SOT-23</text:p>
          </table:table-cell>
          <table:table-cell office:value-type="string" calcext:value-type="string">
            <text:p>http://www.aosmd.com/pdfs/datasheet/AO3400A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-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hryk:TE-SPDT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20k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 SMD:R 0805 2012Metric Pad1.20x1.40mm HandSolder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60k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 SMD:R 0805 2012Metric Pad1.20x1.40mm HandSolder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68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or SMD:R 0805 2012Metric Pad1.20x1.40mm HandSolder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4.7k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 SMD:R 0805 2012Metric Pad1.20x1.40mm HandSolder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P63203W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ackage TO SOT SMD:TSOT-23-6</text:p>
          </table:table-cell>
          <table:table-cell office:value-type="string" calcext:value-type="string">
            <text:p>https://www.diodes.com/assets/Datasheets/AP63200-AP63201-AP63203-AP63205.pdf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P63201W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ackage TO SOT SMD:TSOT-23-6</text:p>
          </table:table-cell>
          <table:table-cell office:value-type="string" calcext:value-type="string">
            <text:p>https://www.diodes.com/assets/Datasheets/AP63200-AP63201-AP63203-AP63205.pdf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TV-827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ackage DIP:SMDIP-8 W9.53mm</text:p>
          </table:table-cell>
          <table:table-cell office:value-type="string" calcext:value-type="string">
            <text:p>http://www.us.liteon.com/downloads/LTV-817-827-847.PD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Ehryk:WIRE-14AW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Ehryk:WIRE-16AWG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Ehryk:WIRE-16AW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Ehryk:WIRE-14AW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Ehryk:WIRE-14AW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Ehryk:WIRE-14AW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Ehryk:WIRE-14AWG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Ehryk:WIRE-18AW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Ehryk:WIRE-18AWG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0μ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apacitor SMD:C 1206 3216Metric Pad1.33x1.80mm HandSold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.8μ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 SMD:L Abracon ASPI-0630LR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20Ω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esistor SMD:R 0805 2012Metric Pad1.20x1.40mm HandSolder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2kΩ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R18</text:p>
          </table:table-cell>
          <table:table-cell office:value-type="string" calcext:value-type="string">
            <text:p>Resistor SMD:R 0805 2012Metric Pad1.20x1.40mm HandSolder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.2kΩ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R11</text:p>
          </table:table-cell>
          <table:table-cell office:value-type="string" calcext:value-type="string">
            <text:p>Resistor SMD:R 0805 2012Metric Pad1.20x1.40mm HandSolder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0Ω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R16</text:p>
          </table:table-cell>
          <table:table-cell office:value-type="string" calcext:value-type="string">
            <text:p>Resistor SMD:R 0805 2012Metric Pad1.20x1.40mm HandSolder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2μ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9,C10,C11,C12</text:p>
          </table:table-cell>
          <table:table-cell office:value-type="string" calcext:value-type="string">
            <text:p>Capacitor SMD:C 1210 3225Metric Pad1.33x2.70mm HandSolder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0k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,R5,R9,R12,R13</text:p>
          </table:table-cell>
          <table:table-cell office:value-type="string" calcext:value-type="string">
            <text:p>Resistor SMD:R 0805 2012Metric Pad1.20x1.40mm HandSolder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0.1μ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,C2,C5,C6,C7,C13,C14,C15,C16</text:p>
          </table:table-cell>
          <table:table-cell office:value-type="string" calcext:value-type="string">
            <text:p>Capacitor SMD:C 0805 2012Metric Pad1.18x1.45mm HandSol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22T01:39:38.879242900</dc:date>
    <meta:editing-duration>PT2M31S</meta:editing-duration>
    <meta:editing-cycles>1</meta:editing-cycles>
    <meta:generator>LibreOffice/25.2.7.2$Windows_X86_64 LibreOffice_project/5cbfd1ab6520636bb5f7b99185aa69bd7456825d</meta:generator>
    <meta:print-date>2026-06-22T01:39:54.414530000</meta:print-date>
    <meta:document-statistic meta:table-count="1" meta:cell-count="172" meta:object-count="0"/>
  </office:meta>
</office:document-meta>
</file>